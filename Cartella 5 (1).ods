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77333333333333cm" style:use-optimal-column-width="true"/>
    </style:style>
    <style:style style:name="co3" style:family="table-column">
      <style:table-column-properties fo:break-before="auto" style:column-width="6.45583333333333cm" style:use-optimal-column-width="true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4.94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ci</text:p>
          </table:table-cell>
          <table:table-cell office:value-type="string" table:style-name="ce1">
            <text:p>risultato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ato<text:s/></text:p>
          </table:table-cell>
          <table:table-cell table:style-name="ce1"/>
          <table:table-cell office:value-type="string" table:style-name="ce1">
            <text:p>z</text:p>
          </table:table-cell>
          <table:table-cell office:value-type="float" office:value="0.37939094338624979" table:formula="of:=NORMDIST([.D6];[.G13];[.H13];TRUE)" table:style-name="ce1">
            <text:p>0,379390943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quota sopra 4</text:p>
          </table:table-cell>
          <table:table-cell office:value-type="float" office:value="0.62060905661375021" table:formula="of:=1-[.G5]" table:style-name="ce1">
            <text:p>0,620609057</text:p>
          </table:table-cell>
          <table:table-cell office:value-type="string" table:style-name="ce1">
            <text:p>il 62% supera il valore 3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string" table:style-name="ce3">
            <text:p>media</text:p>
          </table:table-cell>
          <table:table-cell office:value-type="string" table:style-name="ce3">
            <text:p>dev.st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.55" table:formula="of:=AVERAGE([.B3:.B22])" table:style-name="ce3">
            <text:p>3,55</text:p>
          </table:table-cell>
          <table:table-cell office:value-type="float" office:value="1.7910596686995397" table:formula="of:=STDEV([.B3:.B22])" table:style-name="ce3">
            <text:p>1,79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<text:s/>1 dev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3.600000000000001" table:formula="of:=20*0.68" table:style-name="ce3">
            <text:p>13,60</text:p>
          </table:table-cell>
          <table:table-cell office:value-type="string" table:style-name="ce4">
            <text:p>lanci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3">
            <text:p>2 dev<text:s/>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9" table:formula="of:=20*0.95" table:style-name="ce1">
            <text:p>19</text:p>
          </table:table-cell>
          <table:table-cell office:value-type="string" table:style-name="ce4">
            <text:p>lanci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7-08T14:40:32Z</meta:creation-date>
    <dc:date>2026-07-08T16:23:43Z</dc:date>
  </office:meta>
</office:document-meta>
</file>